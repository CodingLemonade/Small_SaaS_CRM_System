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B1000002E4BC762A40.png" manifest:media-type="image/png"/>
  <manifest:file-entry manifest:full-path="Pictures/100000010000077E0000031FAC6C5B6A.png" manifest:media-type="image/png"/>
  <manifest:file-entry manifest:full-path="Pictures/1000000100000195000002C41BDC25D8.png" manifest:media-type="image/png"/>
  <manifest:file-entry manifest:full-path="Pictures/10000001000004570000036D7CE2674F.png" manifest:media-type="image/png"/>
  <manifest:file-entry manifest:full-path="Pictures/10000001000006B80000031652A0EDEE.png" manifest:media-type="image/png"/>
  <manifest:file-entry manifest:full-path="Pictures/100000010000077E00000321CCD820BF.png" manifest:media-type="image/png"/>
  <manifest:file-entry manifest:full-path="Pictures/10000001000001B1000002E3972D5465.png" manifest:media-type="image/png"/>
  <manifest:file-entry manifest:full-path="Pictures/10000001000007800000033A5DD3AB07.png" manifest:media-type="image/png"/>
  <manifest:file-entry manifest:full-path="Pictures/10000001000006B50000031B639025DE.png" manifest:media-type="image/png"/>
  <manifest:file-entry manifest:full-path="Pictures/1000000100000750000003248AE71D84.png" manifest:media-type="image/png"/>
  <manifest:file-entry manifest:full-path="Pictures/1000000100000694000003641D0B2036.png" manifest:media-type="image/png"/>
  <manifest:file-entry manifest:full-path="Pictures/1000000100000196000002D40B8272E9.png" manifest:media-type="image/png"/>
  <manifest:file-entry manifest:full-path="Pictures/10000001000003370000022378584384.png" manifest:media-type="image/png"/>
  <manifest:file-entry manifest:full-path="Pictures/100000010000032E0000031CA063183B.png" manifest:media-type="image/png"/>
  <manifest:file-entry manifest:full-path="Pictures/10000001000006D2000003283BD19731.png" manifest:media-type="image/png"/>
  <manifest:file-entry manifest:full-path="Pictures/10000001000006B7000002FBA7608752.png" manifest:media-type="image/png"/>
  <manifest:file-entry manifest:full-path="Pictures/10000001000007030000021DFE22B804.png" manifest:media-type="image/png"/>
  <manifest:file-entry manifest:full-path="Pictures/10000001000007170000021477C26B2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521in" table:align="left"/>
    </style:style>
    <style:style style:name="Table1.A" style:family="table-column">
      <style:table-column-properties style:column-width="1.7521in"/>
    </style:style>
    <style:style style:name="Table1.B" style:family="table-column">
      <style:table-column-properties style:column-width="5in"/>
    </style:style>
    <style:style style:name="Table1.A1" style:family="table-cell">
      <style:table-cell-properties style:vertical-align="middle" fo:padding="0.0194in" fo:border="none"/>
    </style:style>
    <style:style style:name="Table2" style:family="table">
      <style:table-properties style:width="3.2042in" table:align="left"/>
    </style:style>
    <style:style style:name="Table2.A" style:family="table-column">
      <style:table-column-properties style:column-width="1.1521in"/>
    </style:style>
    <style:style style:name="Table2.B" style:family="table-column">
      <style:table-column-properties style:column-width="2.0521in"/>
    </style:style>
    <style:style style:name="Table2.A1" style:family="table-cell">
      <style:table-cell-properties style:vertical-align="middle" fo:padding="0.0194in" fo:border="none"/>
    </style:style>
    <style:style style:name="Table3" style:family="table">
      <style:table-properties style:width="3.4688in" table:align="left"/>
    </style:style>
    <style:style style:name="Table3.A" style:family="table-column">
      <style:table-column-properties style:column-width="1.2264in"/>
    </style:style>
    <style:style style:name="Table3.B" style:family="table-column">
      <style:table-column-properties style:column-width="2.2424in"/>
    </style:style>
    <style:style style:name="Table3.A1" style:family="table-cell">
      <style:table-cell-properties style:vertical-align="middle" fo:padding="0.0194in" fo:border="none"/>
    </style:style>
    <style:style style:name="Table4" style:family="table">
      <style:table-properties style:width="3.0382in" table:align="left"/>
    </style:style>
    <style:style style:name="Table4.A" style:family="table-column">
      <style:table-column-properties style:column-width="1.5222in"/>
    </style:style>
    <style:style style:name="Table4.B" style:family="table-column">
      <style:table-column-properties style:column-width="1.516in"/>
    </style:style>
    <style:style style:name="Table4.A1" style:family="table-cell">
      <style:table-cell-properties style:vertical-align="middle" fo:padding="0.0194in" fo:border="none"/>
    </style:style>
    <style:style style:name="Table5" style:family="table">
      <style:table-properties style:width="3.0236in" table:align="left"/>
    </style:style>
    <style:style style:name="Table5.A" style:family="table-column">
      <style:table-column-properties style:column-width="1.5729in"/>
    </style:style>
    <style:style style:name="Table5.B" style:family="table-column">
      <style:table-column-properties style:column-width="1.4507in"/>
    </style:style>
    <style:style style:name="Table5.A1" style:family="table-cell">
      <style:table-cell-properties style:vertical-align="middle" fo:padding="0.0194in" fo:border="none"/>
    </style:style>
    <style:style style:name="Table6" style:family="table">
      <style:table-properties style:width="3.8667in" table:align="left"/>
    </style:style>
    <style:style style:name="Table6.A" style:family="table-column">
      <style:table-column-properties style:column-width="1.9528in"/>
    </style:style>
    <style:style style:name="Table6.B" style:family="table-column">
      <style:table-column-properties style:column-width="1.9139in"/>
    </style:style>
    <style:style style:name="Table6.A1" style:family="table-cell">
      <style:table-cell-properties style:vertical-align="middle" fo:padding="0.0194in" fo:border="none"/>
    </style:style>
    <style:style style:name="P1" style:family="paragraph" style:parent-style-name="Heading_20_1">
      <style:text-properties fo:font-size="32pt" style:font-size-asian="32pt" style:font-size-complex="32pt"/>
    </style:style>
    <style:style style:name="P2" style:family="paragraph" style:parent-style-name="Heading_20_2">
      <style:text-properties fo:font-style="normal" style:font-style-asian="normal" style:font-style-complex="normal"/>
    </style:style>
    <style:style style:name="P3" style:family="paragraph" style:parent-style-name="Horizontal_20_Line">
      <style:paragraph-properties fo:padding="0in" fo:border-left="none" fo:border-right="none" fo:border-top="none" fo:border-bottom="0.2pt solid #808080"/>
    </style:style>
    <style:style style:name="P4" style:family="paragraph" style:parent-style-name="Heading_20_1">
      <style:text-properties fo:font-size="28pt" style:font-size-asian="28pt" style:font-size-complex="28pt"/>
    </style:style>
    <style:style style:name="P5" style:family="paragraph" style:parent-style-name="Heading_20_2">
      <style:text-properties fo:font-size="20pt" style:font-size-asian="20pt" style:font-size-complex="20pt"/>
    </style:style>
    <style:style style:name="P6" style:family="paragraph" style:parent-style-name="Text_20_body">
      <style:text-properties fo:font-size="16pt" officeooo:rsid="000a75e5" officeooo:paragraph-rsid="000a75e5" style:font-size-asian="16pt" style:font-size-complex="16pt"/>
    </style:style>
    <style:style style:name="P7" style:family="paragraph" style:parent-style-name="Text_20_body">
      <style:text-properties fo:font-size="16pt" style:font-size-asian="16pt" style:font-size-complex="16pt"/>
    </style:style>
    <style:style style:name="P8" style:family="paragraph" style:parent-style-name="Heading_20_2">
      <style:text-properties fo:font-size="16pt" fo:font-weight="normal" style:font-size-asian="16pt" style:font-weight-asian="normal" style:font-size-complex="16pt" style:font-weight-complex="normal"/>
    </style:style>
    <style:style style:name="P9" style:family="paragraph" style:parent-style-name="Text_20_body">
      <style:text-properties fo:font-size="16pt" officeooo:paragraph-rsid="000b343a" style:font-size-asian="16pt" style:font-size-complex="16pt"/>
    </style:style>
    <style:style style:name="P10" style:family="paragraph" style:parent-style-name="Text_20_body">
      <style:text-properties officeooo:paragraph-rsid="000b343a"/>
    </style:style>
    <style:style style:name="P11" style:family="paragraph" style:parent-style-name="Heading_20_1">
      <style:text-properties fo:font-size="28pt" officeooo:paragraph-rsid="000b343a" style:font-size-asian="28pt" style:font-size-complex="28pt"/>
    </style:style>
    <style:style style:name="P12" style:family="paragraph" style:parent-style-name="Heading_20_1">
      <style:paragraph-properties fo:break-before="page"/>
      <style:text-properties fo:font-size="28pt" officeooo:paragraph-rsid="000b343a" style:font-size-asian="28pt" style:font-size-complex="28pt"/>
    </style:style>
    <style:style style:name="P13" style:family="paragraph" style:parent-style-name="Text_20_body" style:list-style-name="L1">
      <style:paragraph-properties fo:margin-top="0in" fo:margin-bottom="0in" style:contextual-spacing="false"/>
      <style:text-properties fo:font-size="16pt" style:font-size-asian="16pt" style:font-size-complex="16pt"/>
    </style:style>
    <style:style style:name="P14" style:family="paragraph" style:parent-style-name="Text_20_body" style:list-style-name="L1">
      <style:text-properties fo:font-size="16pt" style:font-size-asian="16pt" style:font-size-complex="16pt"/>
    </style:style>
    <style:style style:name="P15" style:family="paragraph" style:parent-style-name="Horizontal_20_Line">
      <style:paragraph-properties fo:padding="0in" fo:border="none"/>
    </style:style>
    <style:style style:name="P16" style:family="paragraph" style:parent-style-name="Table_20_Heading">
      <style:text-properties fo:font-size="16pt" style:font-size-asian="16pt" style:font-size-complex="16pt"/>
    </style:style>
    <style:style style:name="P17" style:family="paragraph" style:parent-style-name="Table_20_Contents">
      <style:text-properties fo:font-size="16pt" style:font-size-asian="16pt" style:font-size-complex="16pt"/>
    </style:style>
    <style:style style:name="P18" style:family="paragraph" style:parent-style-name="Text_20_body" style:list-style-name="L2">
      <style:paragraph-properties fo:margin-top="0in" fo:margin-bottom="0in" style:contextual-spacing="false"/>
      <style:text-properties fo:font-size="16pt" style:font-size-asian="16pt" style:font-size-complex="16pt"/>
    </style:style>
    <style:style style:name="P19" style:family="paragraph" style:parent-style-name="Text_20_body" style:list-style-name="L2">
      <style:text-properties fo:font-size="16pt" style:font-size-asian="16pt" style:font-size-complex="16pt"/>
    </style:style>
    <style:style style:name="P20" style:family="paragraph" style:parent-style-name="Heading_20_3">
      <style:text-properties fo:font-weight="normal" officeooo:rsid="00100034" officeooo:paragraph-rsid="00100034" style:font-weight-asian="normal" style:font-weight-complex="normal"/>
    </style:style>
    <style:style style:name="P21" style:family="paragraph" style:parent-style-name="Text_20_body">
      <style:text-properties officeooo:rsid="00100034" officeooo:paragraph-rsid="00100034"/>
    </style:style>
    <style:style style:name="P22" style:family="paragraph" style:parent-style-name="Text_20_body" style:list-style-name="L3">
      <style:paragraph-properties fo:margin-top="0in" fo:margin-bottom="0in" style:contextual-spacing="false"/>
    </style:style>
    <style:style style:name="P23" style:family="paragraph" style:parent-style-name="Text_20_body" style:list-style-name="L3">
      <style:text-properties officeooo:paragraph-rsid="0017e6d9"/>
    </style:style>
    <style:style style:name="P24" style:family="paragraph" style:parent-style-name="Text_20_body" style:list-style-name="L3">
      <style:text-properties fo:font-weight="normal" officeooo:rsid="0010e568" officeooo:paragraph-rsid="0017e6d9" style:font-weight-asian="normal" style:font-weight-complex="normal"/>
    </style:style>
    <style:style style:name="P25" style:family="paragraph" style:parent-style-name="Horizontal_20_Line">
      <style:text-properties fo:font-size="14pt" officeooo:rsid="0010e568" officeooo:paragraph-rsid="0010e568" style:font-size-asian="12.25pt" style:font-size-complex="14pt"/>
    </style:style>
    <style:style style:name="P26" style:family="paragraph" style:parent-style-name="Heading_20_2">
      <style:text-properties officeooo:paragraph-rsid="0017e6d9"/>
    </style:style>
    <style:style style:name="P27" style:family="paragraph" style:parent-style-name="Text_20_body" style:list-style-name="L4">
      <style:paragraph-properties fo:margin-top="0in" fo:margin-bottom="0in" style:contextual-spacing="false"/>
    </style:style>
    <style:style style:name="P28" style:family="paragraph" style:parent-style-name="Text_20_body" style:list-style-name="L4"/>
    <style:style style:name="P29" style:family="paragraph" style:parent-style-name="Text_20_body">
      <style:text-properties officeooo:paragraph-rsid="0017e6d9"/>
    </style:style>
    <style:style style:name="P30" style:family="paragraph" style:parent-style-name="Heading_20_3">
      <style:text-properties officeooo:paragraph-rsid="0017e6d9"/>
    </style:style>
    <style:style style:name="P31" style:family="paragraph" style:parent-style-name="Text_20_body">
      <style:text-properties officeooo:rsid="001720bd" officeooo:paragraph-rsid="001720bd"/>
    </style:style>
    <style:style style:name="P32" style:family="paragraph" style:parent-style-name="Heading_20_3">
      <style:text-properties officeooo:paragraph-rsid="001b53b4"/>
    </style:style>
    <style:style style:name="P33" style:family="paragraph" style:parent-style-name="Text_20_body">
      <style:paragraph-properties fo:break-before="page"/>
    </style:style>
    <style:style style:name="P34" style:family="paragraph" style:parent-style-name="Text_20_body">
      <style:text-properties officeooo:paragraph-rsid="001dc352"/>
    </style:style>
    <style:style style:name="P35" style:family="paragraph" style:parent-style-name="Heading_20_1">
      <style:paragraph-properties fo:break-before="page"/>
    </style:style>
    <style:style style:name="P36" style:family="paragraph" style:parent-style-name="Text_20_body">
      <style:text-properties fo:font-size="13pt" style:font-size-asian="13pt" style:font-size-complex="13pt"/>
    </style:style>
    <style:style style:name="P37" style:family="paragraph" style:parent-style-name="Text_20_body" style:list-style-name="L5">
      <style:paragraph-properties fo:margin-top="0in" fo:margin-bottom="0in" style:contextual-spacing="false"/>
    </style:style>
    <style:style style:name="P38" style:family="paragraph" style:parent-style-name="Text_20_body" style:list-style-name="L5"/>
    <style:style style:name="P39" style:family="paragraph" style:parent-style-name="Text_20_body">
      <style:text-properties officeooo:paragraph-rsid="00248292"/>
    </style:style>
    <style:style style:name="P40" style:family="paragraph" style:parent-style-name="Heading_20_1">
      <style:paragraph-properties fo:break-before="page"/>
      <style:text-properties fo:font-size="18pt" officeooo:rsid="0025fc30" officeooo:paragraph-rsid="0025fc30" style:font-size-asian="15.75pt" style:font-size-complex="18pt"/>
    </style:style>
    <style:style style:name="P41" style:family="paragraph" style:parent-style-name="Heading_20_1">
      <style:text-properties fo:font-size="18pt" officeooo:rsid="0025fc30" officeooo:paragraph-rsid="0025fc30" style:font-size-asian="15.75pt" style:font-size-complex="18pt"/>
    </style:style>
    <style:style style:name="P42" style:family="paragraph" style:parent-style-name="Text_20_body" style:list-style-name="L6">
      <style:paragraph-properties fo:margin-top="0in" fo:margin-bottom="0in" style:contextual-spacing="false"/>
    </style:style>
    <style:style style:name="P43" style:family="paragraph" style:parent-style-name="Text_20_body" style:list-style-name="L6"/>
    <style:style style:name="T1" style:family="text">
      <style:text-properties fo:font-size="16pt" style:font-size-asian="16pt" style:font-size-complex="16pt"/>
    </style:style>
    <style:style style:name="T2" style:family="text">
      <style:text-properties officeooo:rsid="0014550d"/>
    </style:style>
    <style:style style:name="T3" style:family="text">
      <style:text-properties fo:font-weight="bold" officeooo:rsid="001dc352" style:font-weight-asian="bold" style:font-weight-complex="bold"/>
    </style:style>
    <style:style style:name="T4" style:family="text">
      <style:text-properties fo:font-weight="bold" style:font-weight-asian="bold" style:font-weight-complex="bold"/>
    </style:style>
    <style:style style:name="T5" style:family="text">
      <style:text-properties officeooo:rsid="0022ab46"/>
    </style:style>
    <style:style style:name="T6" style:family="text">
      <style:text-properties fo:font-weight="bold" officeooo:rsid="00248292" style:font-weight-asian="bold" style:font-weight-complex="bold"/>
    </style:style>
    <style:style style:name="T7" style:family="text">
      <style:text-properties officeooo:rsid="00248292"/>
    </style:style>
    <style:style style:name="T8" style:family="text">
      <style:text-properties officeooo:rsid="0025fc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mall SaaS CRM System</text:h>
      <text:h text:style-name="P2" text:outline-level="2">RevOps / CRM Operations Portfolio Project</text:h>
      <text:p text:style-name="P3"/>
      <text:h text:style-name="P4" text:outline-level="1"/>
      <text:h text:style-name="P4" text:outline-level="1">Project Overview</text:h>
      <text:h text:style-name="P5" text:outline-level="2">Company Name</text:h>
      <text:p text:style-name="P6">CloudNova</text:p>
      <text:h text:style-name="P5" text:outline-level="2">Industry</text:h>
      <text:p text:style-name="P7">B2B SaaS </text:p>
      <text:h text:style-name="P5" text:outline-level="2">Product</text:h>
      <text:h text:style-name="P8" text:outline-level="2">CloudNova Project Suite</text:h>
      <text:p text:style-name="Text_20_body"/>
      <text:h text:style-name="P5" text:outline-level="2">Business Model</text:h>
      <text:p text:style-name="P9">Subscription-Based SaaS</text:p>
      <text:p text:style-name="P10"><text:line-break/><text:span text:style-name="T1">B2B SaaS subscription software for remote project management.</text:span></text:p>
      <text:h text:style-name="P11" text:outline-level="1"/>
      <text:h text:style-name="P12" text:outline-level="1">Project Objectives</text:h>
      <text:p text:style-name="P7">This CRM system was designed to:</text:p>
      <text:list text:style-name="L1">
        <text:list-item>
          <text:p text:style-name="P13">Organize customer and prospect data </text:p>
        </text:list-item>
        <text:list-item>
          <text:p text:style-name="P13">Manage the sales pipeline </text:p>
        </text:list-item>
        <text:list-item>
          <text:p text:style-name="P13">Track lifecycle stages </text:p>
        </text:list-item>
        <text:list-item>
          <text:p text:style-name="P13">Improve reporting visibility </text:p>
        </text:list-item>
        <text:list-item>
          <text:p text:style-name="P13">Automate operational workflows </text:p>
        </text:list-item>
        <text:list-item>
          <text:p text:style-name="P14">Standardize CRM data management </text:p>
        </text:list-item>
      </text:list>
      <text:p text:style-name="P15"/>
      <text:h text:style-name="P4" text:outline-level="1">CRM Platform Used</text:h>
      <table:table table:name="Table1" table:style-name="Table1">
        <table:table-column table:style-name="Table1.A"/>
        <table:table-column table:style-name="Table1.B"/>
        <table:table-header-rows>
          <table:table-row>
            <table:table-cell table:style-name="Table1.A1" office:value-type="string">
              <text:p text:style-name="P16">Platform</text:p>
            </table:table-cell>
            <table:table-cell table:style-name="Table1.A1" office:value-type="string">
              <text:p text:style-name="P16">Purpose</text:p>
            </table:table-cell>
          </table:table-row>
        </table:table-header-rows>
        <table:table-row>
          <table:table-cell table:style-name="Table1.A1" office:value-type="string">
            <text:p text:style-name="P17">HubSpot</text:p>
          </table:table-cell>
          <table:table-cell table:style-name="Table1.A1" office:value-type="string">
            <text:p text:style-name="P17">CRM operations and workflow management</text:p>
          </table:table-cell>
        </table:table-row>
        <table:table-row>
          <table:table-cell table:style-name="Table1.A1" office:value-type="string">
            <text:p text:style-name="P17">Salesforce</text:p>
          </table:table-cell>
          <table:table-cell table:style-name="Table1.A1" office:value-type="string">
            <text:p text:style-name="P17">Admin and automation practice</text:p>
          </table:table-cell>
        </table:table-row>
        <table:table-row>
          <table:table-cell table:style-name="Table1.A1" office:value-type="string">
            <text:p text:style-name="P17">Google Sheets</text:p>
          </table:table-cell>
          <table:table-cell table:style-name="Table1.A1" office:value-type="string">
            <text:p text:style-name="P17">Data cleanup and standardization</text:p>
          </table:table-cell>
        </table:table-row>
      </table:table>
      <text:p text:style-name="P15"/>
      <text:h text:style-name="Heading_20_1" text:outline-level="1">4. CRM Structure</text:h>
      <text:h text:style-name="P5" text:outline-level="2">Contacts</text:h>
      <text:p text:style-name="P7">Purpose:<text:line-break/>Track individual leads, prospects, and customers.</text:p>
      <text:p text:style-name="P7">Tracked Fields:</text:p>
      <text:list text:style-name="L2">
        <text:list-item>
          <text:p text:style-name="P18">Name </text:p>
        </text:list-item>
        <text:list-item>
          <text:p text:style-name="P18">Email </text:p>
        </text:list-item>
        <text:list-item>
          <text:p text:style-name="P18">Phone </text:p>
        </text:list-item>
        <text:list-item>
          <text:p text:style-name="P18">Job Title </text:p>
        </text:list-item>
        <text:list-item>
          <text:p text:style-name="P18">Lifecycle Stage </text:p>
        </text:list-item>
        <text:list-item>
          <text:p text:style-name="P19">Lead Source </text:p>
        </text:list-item>
      </text:list>
      <text:h text:style-name="P20" text:outline-level="3"><draw:frame draw:style-name="fr1" draw:name="Image2" text:anchor-type="char" svg:width="6.9252in" svg:height="2.8846in" draw:z-index="1"><draw:image xlink:href="Pictures/100000010000077E0000031FAC6C5B6A.png" xlink:type="simple" xlink:show="embed" xlink:actuate="onLoad" draw:mime-type="image/png"/></draw:frame><text:soft-page-break/>(Customized Create Contact form)</text:h>
      <text:p text:style-name="P21"><draw:frame draw:style-name="fr1" draw:name="Image1" text:anchor-type="char" svg:width="6.9252in" svg:height="2.8917in" draw:z-index="0"><draw:image xlink:href="Pictures/100000010000077E00000321CCD820BF.png" xlink:type="simple" xlink:show="embed" xlink:actuate="onLoad" draw:mime-type="image/png"/></draw:frame><draw:frame draw:style-name="fr2" draw:name="Image3" text:anchor-type="char" svg:width="8.1063in" svg:height="4.5402in" draw:z-index="2"><draw:image xlink:href="Pictures/10000001000007800000033A5DD3AB07.png" xlink:type="simple" xlink:show="embed" xlink:actuate="onLoad" draw:mime-type="image/png"/></draw:frame>(Contact Lifycycle Stage/ <text:span text:style-name="T2">Data Model</text:span>)</text:p>
      <text:p text:style-name="Horizontal_20_Line"/>
      <text:h text:style-name="Heading_20_2" text:outline-level="2">Companies</text:h>
      <text:p text:style-name="Text_20_body">Purpose:<text:line-break/>Track business accounts associated with contacts and deals.</text:p>
      <text:p text:style-name="Text_20_body"><text:soft-page-break/>Tracked Fields:</text:p>
      <text:list text:style-name="L3">
        <text:list-item>
          <text:p text:style-name="P22">Company Name </text:p>
        </text:list-item>
        <text:list-item>
          <text:p text:style-name="P22">Industry </text:p>
        </text:list-item>
        <text:list-item>
          <text:p text:style-name="P22">Employee Count </text:p>
        </text:list-item>
        <text:list-item>
          <text:p text:style-name="P22">Revenue </text:p>
        </text:list-item>
        <text:list-item>
          <text:p text:style-name="P22">Website </text:p>
        </text:list-item>
        <text:list-item>
          <text:p text:style-name="P23"><draw:frame draw:style-name="fr3" draw:name="Image5" text:anchor-type="char" svg:x="0.0638in" svg:y="0.3138in" svg:width="6.9252in" svg:height="3.2063in" draw:z-index="4"><draw:image xlink:href="Pictures/10000001000006B50000031B639025DE.png" xlink:type="simple" xlink:show="embed" xlink:actuate="onLoad" draw:mime-type="image/png"/></draw:frame>Company Owner </text:p>
        </text:list-item>
        <text:list-item>
          <text:p text:style-name="P24"><draw:frame draw:style-name="fr3" draw:name="Image6" text:anchor-type="char" svg:x="-0.0957in" svg:y="3.7028in" svg:width="6.9252in" svg:height="3.1807in" draw:z-index="5"><draw:image xlink:href="Pictures/10000001000006B80000031652A0EDEE.png" xlink:type="simple" xlink:show="embed" xlink:actuate="onLoad" draw:mime-type="image/png"/></draw:frame>(Company form/properties)</text:p>
        </text:list-item>
      </text:list>
      <text:p text:style-name="P25"><draw:frame draw:style-name="fr3" draw:name="Image9" text:anchor-type="char" svg:x="-0.1409in" svg:y="-0.3028in" svg:width="6.6291in" svg:height="5.2327in" draw:z-index="7"><draw:image xlink:href="Pictures/10000001000004570000036D7CE2674F.png" xlink:type="simple" xlink:show="embed" xlink:actuate="onLoad" draw:mime-type="image/png"/></draw:frame><text:soft-page-break/>(Company Associations)</text:p>
      <text:h text:style-name="Heading_20_2" text:outline-level="2"/>
      <text:h text:style-name="P26" text:outline-level="2">Deals</text:h>
      <text:p text:style-name="Text_20_body">Purpose:<text:line-break/>Track sales opportunities and revenue progression.</text:p>
      <text:p text:style-name="Text_20_body">Tracked Fields:</text:p>
      <text:list text:style-name="L4">
        <text:list-item>
          <text:p text:style-name="P27">Deal Stage </text:p>
        </text:list-item>
        <text:list-item>
          <text:p text:style-name="P27">Deal Amount </text:p>
        </text:list-item>
        <text:list-item>
          <text:p text:style-name="P27">Close Date </text:p>
        </text:list-item>
        <text:list-item>
          <text:p text:style-name="P27">Pipeline </text:p>
        </text:list-item>
        <text:list-item>
          <text:p text:style-name="P28">Deal Owner </text:p>
        </text:list-item>
      </text:list>
      <text:h text:style-name="Heading_20_3" text:outline-level="3"/>
      <text:p text:style-name="Horizontal_20_Line"/>
      <text:h text:style-name="Heading_20_1" text:outline-level="1"><text:soft-page-break/>5. Lifecycle Stages</text:h>
      <table:table table:name="Table2" table:style-name="Table2">
        <table:table-column table:style-name="Table2.A"/>
        <table:table-column table:style-name="Table2.B"/>
        <table:table-header-rows>
          <table:table-row>
            <table:table-cell table:style-name="Table2.A1" office:value-type="string">
              <text:p text:style-name="Table_20_Heading">Lifecycle Stage</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Heading"/>
          </table:table-cell>
          <table:table-cell table:style-name="Table2.A1" office:value-type="string">
            <text:p text:style-name="Table_20_Heading"/>
          </table:table-cell>
        </table:table-row>
        <table:table-row>
          <table:table-cell table:style-name="Table2.A1" office:value-type="string">
            <text:p text:style-name="Table_20_Contents">Lead</text:p>
          </table:table-cell>
          <table:table-cell table:style-name="Table2.A1" office:value-type="string">
            <text:p text:style-name="Table_20_Contents">Initial inquiry or engagement</text:p>
          </table:table-cell>
        </table:table-row>
        <table:table-row>
          <table:table-cell table:style-name="Table2.A1" office:value-type="string">
            <text:p text:style-name="Table_20_Contents">MQL</text:p>
          </table:table-cell>
          <table:table-cell table:style-name="Table2.A1" office:value-type="string">
            <text:p text:style-name="Table_20_Contents">Marketing-qualified lead</text:p>
          </table:table-cell>
        </table:table-row>
        <table:table-row>
          <table:table-cell table:style-name="Table2.A1" office:value-type="string">
            <text:p text:style-name="Table_20_Contents">SQL</text:p>
          </table:table-cell>
          <table:table-cell table:style-name="Table2.A1" office:value-type="string">
            <text:p text:style-name="Table_20_Contents">Sales-qualified lead</text:p>
          </table:table-cell>
        </table:table-row>
        <table:table-row>
          <table:table-cell table:style-name="Table2.A1" office:value-type="string">
            <text:p text:style-name="Table_20_Contents">Opportunity</text:p>
          </table:table-cell>
          <table:table-cell table:style-name="Table2.A1" office:value-type="string">
            <text:p text:style-name="Table_20_Contents">Active sales conversation</text:p>
          </table:table-cell>
        </table:table-row>
        <table:table-row>
          <table:table-cell table:style-name="Table2.A1" office:value-type="string">
            <text:p text:style-name="Table_20_Contents">Customer</text:p>
          </table:table-cell>
          <table:table-cell table:style-name="Table2.A1" office:value-type="string">
            <text:p text:style-name="Table_20_Contents">Closed-won client</text:p>
          </table:table-cell>
        </table:table-row>
      </table:table>
      <text:p text:style-name="Horizontal_20_Line"/>
      <text:h text:style-name="Heading_20_2" text:outline-level="2">Lifecycle Management Process</text:h>
      <text:p text:style-name="Text_20_body"/>
      <text:p text:style-name="Text_20_body"/>
      <text:h text:style-name="Heading_20_3" text:outline-level="3"><draw:frame draw:style-name="fr3" draw:name="Image4" text:anchor-type="char" svg:x="-0.0528in" svg:y="-0.0555in" svg:width="6.9252in" svg:height="2.9736in" draw:z-index="3"><draw:image xlink:href="Pictures/1000000100000750000003248AE71D84.png" xlink:type="simple" xlink:show="embed" xlink:actuate="onLoad" draw:mime-type="image/png"/></draw:frame></text:h>
      <text:p text:style-name="Text_20_body"/>
      <text:p text:style-name="Horizontal_20_Line"/>
      <text:h text:style-name="Heading_20_1" text:outline-level="1">6. Sales Pipeline Structure</text:h>
      <table:table table:name="Table3" table:style-name="Table3">
        <table:table-column table:style-name="Table3.A"/>
        <table:table-column table:style-name="Table3.B"/>
        <table:table-header-rows>
          <table:table-row>
            <table:table-cell table:style-name="Table3.A1" office:value-type="string">
              <text:p text:style-name="Table_20_Heading">Deal Stage</text:p>
            </table:table-cell>
            <table:table-cell table:style-name="Table3.A1" office:value-type="string">
              <text:p text:style-name="Table_20_Heading">Purpose</text:p>
            </table:table-cell>
          </table:table-row>
        </table:table-header-rows>
        <table:table-row>
          <table:table-cell table:style-name="Table3.A1" office:value-type="string">
            <text:p text:style-name="Table_20_Contents">New Lead</text:p>
          </table:table-cell>
          <table:table-cell table:style-name="Table3.A1" office:value-type="string">
            <text:p text:style-name="Table_20_Contents">Initial sales entry</text:p>
          </table:table-cell>
        </table:table-row>
        <table:table-row>
          <table:table-cell table:style-name="Table3.A1" office:value-type="string">
            <text:p text:style-name="Table_20_Contents">Discovery</text:p>
          </table:table-cell>
          <table:table-cell table:style-name="Table3.A1" office:value-type="string">
            <text:p text:style-name="Table_20_Contents">Qualification process</text:p>
          </table:table-cell>
        </table:table-row>
        <table:table-row>
          <table:table-cell table:style-name="Table3.A1" office:value-type="string">
            <text:p text:style-name="Table_20_Contents">Demo Scheduled</text:p>
          </table:table-cell>
          <table:table-cell table:style-name="Table3.A1" office:value-type="string">
            <text:p text:style-name="Table_20_Contents">Product demonstration</text:p>
          </table:table-cell>
        </table:table-row>
        <table:table-row>
          <table:table-cell table:style-name="Table3.A1" office:value-type="string">
            <text:p text:style-name="Table_20_Contents">Proposal Sent</text:p>
          </table:table-cell>
          <table:table-cell table:style-name="Table3.A1" office:value-type="string">
            <text:p text:style-name="Table_20_Contents">Pricing/proposal phase</text:p>
          </table:table-cell>
        </table:table-row>
        <table:table-row>
          <table:table-cell table:style-name="Table3.A1" office:value-type="string">
            <text:p text:style-name="Table_20_Contents">Negotiation</text:p>
          </table:table-cell>
          <table:table-cell table:style-name="Table3.A1" office:value-type="string">
            <text:p text:style-name="Table_20_Contents">Final contract discussion</text:p>
          </table:table-cell>
        </table:table-row>
        <text:soft-page-break/>
        <table:table-row>
          <table:table-cell table:style-name="Table3.A1" office:value-type="string">
            <text:p text:style-name="Table_20_Contents">Closed Won</text:p>
          </table:table-cell>
          <table:table-cell table:style-name="Table3.A1" office:value-type="string">
            <text:p text:style-name="Table_20_Contents">Successful customer acquisition</text:p>
          </table:table-cell>
        </table:table-row>
        <table:table-row>
          <table:table-cell table:style-name="Table3.A1" office:value-type="string">
            <text:p text:style-name="Table_20_Contents">Closed Lost</text:p>
          </table:table-cell>
          <table:table-cell table:style-name="Table3.A1" office:value-type="string">
            <text:p text:style-name="Table_20_Contents">Lost opportunity</text:p>
          </table:table-cell>
        </table:table-row>
      </table:table>
      <text:p text:style-name="Horizontal_20_Line"/>
      <text:h text:style-name="Heading_20_1" text:outline-level="1">7. Workflow Automations</text:h>
      <text:h text:style-name="Heading_20_2" text:outline-level="2">Workflow 1 — Lead Assignment</text:h>
      <text:h text:style-name="Heading_20_3" text:outline-level="3">Trigger</text:h>
      <text:p text:style-name="Text_20_body">When a new lead is created and the lead has a lifecycle stage of “Lead” or “Marketing Qualified Lead.” </text:p>
      <text:h text:style-name="Heading_20_3" text:outline-level="3">Actions</text:h>
      <text:p text:style-name="Text_20_body">Assign the lead to a sales representative based on territory, company size, or lead source.<text:line-break/>Create a follow-up task for the assigned owner.<text:line-break/>Set lead status to “New.”<text:line-break/>Send an internal notification to the sales owner. </text:p>
      <text:h text:style-name="Heading_20_3" text:outline-level="3">Business Purpose</text:h>
      <text:p text:style-name="P29">This workflow ensures new leads are routed quickly to the correct sales owner, reducing response time and preventing leads from being missed. It supports cleaner lead management, stronger accountability, and faster sales follow-up. </text:p>
      <text:h text:style-name="P30" text:outline-level="3">E<draw:frame draw:style-name="fr3" draw:name="Image8" text:anchor-type="char" svg:x="0.1346in" svg:y="0.4547in" svg:width="6.0528in" svg:height="3.1193in" draw:z-index="6"><draw:image xlink:href="Pictures/1000000100000694000003641D0B2036.png" xlink:type="simple" xlink:show="embed" xlink:actuate="onLoad" draw:mime-type="image/png"/></draw:frame>vidence</text:h>
      <text:p text:style-name="Text_20_body"/>
      <text:p text:style-name="Horizontal_20_Line"/>
      <text:h text:style-name="Heading_20_2" text:outline-level="2"><text:soft-page-break/>Workflow 2 — Follow-Up Automation</text:h>
      <text:h text:style-name="Heading_20_3" text:outline-level="3">Trigger</text:h>
      <text:p text:style-name="P31">When a Subscription invoice is created</text:p>
      <text:h text:style-name="Heading_20_3" text:outline-level="3">Actions</text:h>
      <text:p text:style-name="P31">Create a record of the order.<text:line-break/>Associate the order record with the related contact, company, and deal.<text:line-break/>Update the customer’s lifecycle stage to “Customer” if payment or invoice status confirms an active subscription.<text:line-break/>Create a task for the account owner to follow up with the customer.<text:line-break/>Send an internal notification to the sales or customer success owner. </text:p>
      <text:h text:style-name="Heading_20_3" text:outline-level="3">Business Purpose</text:h>
      <text:p text:style-name="Text_20_body">This workflow keeps revenue and customer records organized after a subscription invoice is created. It helps the business track orders, connect billing activity to CRM records, and make sure customers receive timely follow-up after purchase. </text:p>
      <text:h text:style-name="P32" text:outline-level="3">Evidence</text:h>
      <text:p text:style-name="Text_20_body"><draw:frame draw:style-name="fr3" draw:name="Image7" text:anchor-type="char" svg:x="0.3457in" svg:y="0.0071in" svg:width="2.8126in" svg:height="4.9165in" draw:z-index="8"><draw:image xlink:href="Pictures/1000000100000195000002C41BDC25D8.png" xlink:type="simple" xlink:show="embed" xlink:actuate="onLoad" draw:mime-type="image/png"/></draw:frame></text:p>
      <text:p text:style-name="P15"><draw:frame draw:style-name="fr3" draw:name="Image10" text:anchor-type="char" svg:x="3.7866in" svg:y="1.4008in" svg:width="3.0071in" svg:height="5.1319in" draw:z-index="9"><draw:image xlink:href="Pictures/10000001000001B1000002E3972D5465.png" xlink:type="simple" xlink:show="embed" xlink:actuate="onLoad" draw:mime-type="image/png"/></draw:frame></text:p>
      <text:p text:style-name="P33"/>
      <text:h text:style-name="Heading_20_2" text:outline-level="2">Workflow 3 — Customer Onboarding</text:h>
      <text:h text:style-name="Heading_20_3" text:outline-level="3">Trigger</text:h>
      <text:p text:style-name="Text_20_body">When a deal is marked “Closed Won” or when the customer lifecycle stage changes to “Customer.” </text:p>
      <text:h text:style-name="Heading_20_3" text:outline-level="3">Actions</text:h>
      <text:p text:style-name="Text_20_body">Create an onboarding task for the customer success owner.<text:line-break/>Send a welcome email to the customer.<text:line-break/>Create an onboarding ticket or project record.<text:line-break/>Set onboarding status to “Not Started.”<text:line-break/>Create follow-up tasks for kickoff, setup review, and first check-in.<text:line-break/>Notify the customer success team.</text:p>
      <text:p text:style-name="P34"><text:span text:style-name="T3">With current limitations, a </text:span><text:span text:style-name="T4">task-based onboarding workflow </text:span><text:span text:style-name="T3">will be created.</text:span></text:p>
      <text:h text:style-name="Heading_20_3" text:outline-level="3">Business Purpose</text:h>
      <text:p text:style-name="Text_20_body">This workflow makes sure every new customer receives a structured onboarding process after becoming a customer. It reduces handoff gaps between sales and customer success, improves the customer experience, and helps the business track onboarding progress. </text:p>
      <text:h text:style-name="Heading_20_3" text:outline-level="3">Evidence</text:h>
      <text:p text:style-name="Text_20_body"><draw:frame draw:style-name="fr3" draw:name="Image11" text:anchor-type="char" svg:x="-0.1047in" svg:y="-0.0693in" svg:width="2.8193in" svg:height="5.028in" draw:z-index="10"><draw:image xlink:href="Pictures/1000000100000196000002D40B8272E9.png" xlink:type="simple" xlink:show="embed" xlink:actuate="onLoad" draw:mime-type="image/png"/></draw:frame><draw:frame draw:style-name="fr3" draw:name="Image12" text:anchor-type="char" svg:x="3.5972in" svg:y="-0.0709in" svg:width="2.9425in" svg:height="5.0291in" draw:z-index="11"><draw:image xlink:href="Pictures/10000001000001B1000002E4BC762A40.png" xlink:type="simple" xlink:show="embed" xlink:actuate="onLoad" draw:mime-type="image/png"/></draw:frame></text:p>
      <text:p text:style-name="P15"/>
      <text:h text:style-name="Heading_20_1" text:outline-level="1"/>
      <text:h text:style-name="P35" text:outline-level="1">8. Reporting Dashboard</text:h>
      <text:h text:style-name="Heading_20_2" text:outline-level="2">Dashboard Name</text:h>
      <text:p text:style-name="P36">Revenue Operations Performance Dashboard </text:p>
      <text:p text:style-name="P15"/>
      <text:h text:style-name="Heading_20_2" text:outline-level="2">Reports Created</text:h>
      <table:table table:name="Table4" table:style-name="Table4">
        <table:table-column table:style-name="Table4.A"/>
        <table:table-column table:style-name="Table4.B"/>
        <table:table-header-rows>
          <table:table-row>
            <table:table-cell table:style-name="Table4.A1" office:value-type="string">
              <text:p text:style-name="Table_20_Heading">Report</text:p>
            </table:table-cell>
            <table:table-cell table:style-name="Table4.A1" office:value-type="string">
              <text:p text:style-name="Table_20_Heading">Purpose</text:p>
            </table:table-cell>
          </table:table-row>
        </table:table-header-rows>
        <table:table-row>
          <table:table-cell table:style-name="Table4.A1" office:value-type="string">
            <text:p text:style-name="Table_20_Contents">Deals by Stage</text:p>
          </table:table-cell>
          <table:table-cell table:style-name="Table4.A1" office:value-type="string">
            <text:p text:style-name="Table_20_Contents">Pipeline visibility</text:p>
          </table:table-cell>
        </table:table-row>
        <table:table-row>
          <table:table-cell table:style-name="Table4.A1" office:value-type="string">
            <text:p text:style-name="Table_20_Contents">Revenue Forecast</text:p>
          </table:table-cell>
          <table:table-cell table:style-name="Table4.A1" office:value-type="string">
            <text:p text:style-name="Table_20_Contents">Forecasting</text:p>
          </table:table-cell>
        </table:table-row>
        <table:table-row>
          <table:table-cell table:style-name="Table4.A1" office:value-type="string">
            <text:p text:style-name="Table_20_Contents">Deals Closed vs Goal</text:p>
          </table:table-cell>
          <table:table-cell table:style-name="Table4.A1" office:value-type="string">
            <text:p text:style-name="Table_20_Contents">Sales performance</text:p>
          </table:table-cell>
        </table:table-row>
        <table:table-row>
          <table:table-cell table:style-name="Table4.A1" office:value-type="string">
            <text:p text:style-name="Table_20_Contents">Activities by Rep</text:p>
          </table:table-cell>
          <table:table-cell table:style-name="Table4.A1" office:value-type="string">
            <text:p text:style-name="Table_20_Contents">Productivity tracking</text:p>
          </table:table-cell>
        </table:table-row>
        <table:table-row>
          <table:table-cell table:style-name="Table4.A1" office:value-type="string">
            <text:p text:style-name="Table_20_Contents">Lead Source Report</text:p>
          </table:table-cell>
          <table:table-cell table:style-name="Table4.A1" office:value-type="string">
            <text:p text:style-name="Table_20_Contents">Acquisition analysis</text:p>
          </table:table-cell>
        </table:table-row>
      </table:table>
      <text:p text:style-name="P15"/>
      <text:h text:style-name="Heading_20_2" text:outline-level="2">Dashboard Summary</text:h>
      <text:p text:style-name="P36">This dashboard provides a high-level view of sales and revenue performance across the CRM. The Deals by Stage report gives visibility into the current pipeline and helps identify where deals may be getting stuck. The Revenue Forecast report supports planning by estimating future revenue from active opportunities. The Deals Closed vs Goal report measures whether the sales team is on pace to meet revenue targets. The Activities by Rep report tracks productivity and helps managers understand rep engagement. The Lead Source Report shows which acquisition channels are generating leads, helping the business decide where to focus marketing and sales efforts.</text:p>
      <text:p text:style-name="P36">Together, these reports help sales and revenue operations teams monitor pipeline health, forecast revenue, evaluate team performance, and improve lead generation strategy.</text:p>
      <text:h text:style-name="Heading_20_3" text:outline-level="3">Evidence: <text:span text:style-name="T5">(Next Page)</text:span></text:h>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2" draw:name="Image14" text:anchor-type="char" svg:width="5.7154in" svg:height="3.7984in" draw:z-index="13"><draw:image xlink:href="Pictures/10000001000003370000022378584384.png" xlink:type="simple" xlink:show="embed" xlink:actuate="onLoad" draw:mime-type="image/png"/></draw:frame></text:p>
      <text:p text:style-name="Text_20_body"><draw:frame draw:style-name="fr3" draw:name="Image15" text:anchor-type="char" svg:x="1.3311in" svg:y="0.0925in" svg:width="4.5201in" svg:height="4.4201in" draw:z-index="14"><draw:image xlink:href="Pictures/100000010000032E0000031CA063183B.png" xlink:type="simple" xlink:show="embed" xlink:actuate="onLoad" draw:mime-type="image/png"/></draw:frame></text:p>
      <text:p text:style-name="P33"><draw:frame draw:style-name="fr3" draw:name="Image13" text:anchor-type="char" svg:x="0.2138in" svg:y="0.2598in" svg:width="6.9252in" svg:height="3.2043in" draw:z-index="12"><draw:image xlink:href="Pictures/10000001000006D2000003283BD19731.png" xlink:type="simple" xlink:show="embed" xlink:actuate="onLoad" draw:mime-type="image/png"/></draw:frame><draw:frame draw:style-name="fr3" draw:name="Image16" text:anchor-type="char" svg:x="0.2457in" svg:y="4.5299in" svg:width="6.9252in" svg:height="3.0736in" draw:z-index="15"><draw:image xlink:href="Pictures/10000001000006B7000002FBA7608752.png" xlink:type="simple" xlink:show="embed" xlink:actuate="onLoad" draw:mime-type="image/png"/></draw:frame></text:p>
      <text:p text:style-name="P33"/>
      <text:p text:style-name="P15"/>
      <text:h text:style-name="Heading_20_1" text:outline-level="1">9. CRM Cleanup &amp; Data Governance</text:h>
      <text:h text:style-name="Heading_20_2" text:outline-level="2">Cleanup Standards</text:h>
      <text:list text:style-name="L5">
        <text:list-item>
          <text:p text:style-name="P37">Standardized capitalization </text:p>
        </text:list-item>
        <text:list-item>
          <text:p text:style-name="P37">Removed duplicate records </text:p>
        </text:list-item>
        <text:list-item>
          <text:p text:style-name="P37">Normalized phone numbers </text:p>
        </text:list-item>
        <text:list-item>
          <text:p text:style-name="P37">Validated required fields </text:p>
        </text:list-item>
        <text:list-item>
          <text:p text:style-name="P38">Corrected inconsistent formatting </text:p>
        </text:list-item>
      </text:list>
      <text:p text:style-name="P15"/>
      <text:h text:style-name="Heading_20_2" text:outline-level="2">Data Quality Process</text:h>
      <text:p text:style-name="Text_20_body"/>
      <text:p text:style-name="Text_20_body"><text:span text:style-name="T4">CRM </text:span><text:span text:style-name="T6">D</text:span><text:span text:style-name="T4">ata </text:span><text:span text:style-name="T6">R</text:span><text:span text:style-name="T4">eviewed:</text:span> <text:span text:style-name="T7">C</text:span>ompleteness, accuracy, consistency, and duplicate records before being prepared for import or reporting. Records were first assessed for missing required fields, inconsistent capitalization, invalid formatting, and duplicate contacts or companies.</text:p>
      <text:p text:style-name="P39"><text:span text:style-name="T4">Standardiz</text:span><text:span text:style-name="T6">ing:</text:span><text:span text:style-name="T7"> </text:span>Names, job titles, company names, industries, states, and other text fields were standardized using consistent naming conventions. Phone numbers were normalized into a uniform format, while email addresses and required CRM fields were reviewed for completeness.</text:p>
      <text:p text:style-name="P39"><text:span text:style-name="T6">Deduplication:</text:span><text:span text:style-name="T7"> </text:span>Duplicate records were identified using matching criteria such as email address, phone number, contact name, and company name. Potential duplicates were reviewed before records were merged or retained to prevent the loss of valid information.</text:p>
      <text:p text:style-name="Text_20_body"><text:span text:style-name="T6">Final Review:</text:span><text:span text:style-name="T7"> </text:span>After cleaning, the data was validated to confirm that required fields were populated, formatting rules were followed, and records were ready for CRM import. Any information that could not be confidently verified was left blank or marked for further review rather than being assumed.</text:p>
      <text:h text:style-name="Heading_20_3" text:outline-level="3">Evidence: <text:span text:style-name="T8">(Next Page)</text:span></text:h>
      <text:p text:style-name="Text_20_body"/>
      <text:p text:style-name="P15"/>
      <text:h text:style-name="Heading_20_1" text:outline-level="1"/>
      <text:h text:style-name="P40" text:outline-level="1"/>
      <text:h text:style-name="P41" text:outline-level="1"><draw:frame draw:style-name="fr3" draw:name="Image17" text:anchor-type="char" svg:x="-0.7354in" svg:y="0.3953in" svg:width="8.448in" svg:height="2.5457in" draw:z-index="16"><draw:image xlink:href="Pictures/10000001000007030000021DFE22B804.png" xlink:type="simple" xlink:show="embed" xlink:actuate="onLoad" draw:mime-type="image/png"/></draw:frame><draw:frame draw:style-name="fr3" draw:name="Image18" text:anchor-type="char" svg:x="-0.6945in" svg:y="3.2264in" svg:width="8.3209in" svg:height="2.4382in" draw:z-index="17"><draw:image xlink:href="Pictures/10000001000007170000021477C26B23.png" xlink:type="simple" xlink:show="embed" xlink:actuate="onLoad" draw:mime-type="image/png"/></draw:frame>(Raw and Cleaned Data are put next to each other for easier comparison)</text:h>
      <text:h text:style-name="P35" text:outline-level="1">10. Key Metrics Tracked</text:h>
      <table:table table:name="Table5" table:style-name="Table5">
        <table:table-column table:style-name="Table5.A"/>
        <table:table-column table:style-name="Table5.B"/>
        <table:table-header-rows>
          <table:table-row>
            <table:table-cell table:style-name="Table5.A1" office:value-type="string">
              <text:p text:style-name="Table_20_Heading">Metric</text:p>
            </table:table-cell>
            <table:table-cell table:style-name="Table5.A1" office:value-type="string">
              <text:p text:style-name="Table_20_Heading">Purpose</text:p>
            </table:table-cell>
          </table:table-row>
        </table:table-header-rows>
        <table:table-row>
          <table:table-cell table:style-name="Table5.A1" office:value-type="string">
            <text:p text:style-name="Table_20_Contents">Win Rate</text:p>
          </table:table-cell>
          <table:table-cell table:style-name="Table5.A1" office:value-type="string">
            <text:p text:style-name="Table_20_Contents">Sales effectiveness</text:p>
          </table:table-cell>
        </table:table-row>
        <table:table-row>
          <table:table-cell table:style-name="Table5.A1" office:value-type="string">
            <text:p text:style-name="Table_20_Contents">Pipeline Value</text:p>
          </table:table-cell>
          <table:table-cell table:style-name="Table5.A1" office:value-type="string">
            <text:p text:style-name="Table_20_Contents">Revenue visibility</text:p>
          </table:table-cell>
        </table:table-row>
        <table:table-row>
          <table:table-cell table:style-name="Table5.A1" office:value-type="string">
            <text:p text:style-name="Table_20_Contents">Lead Conversion Rate</text:p>
          </table:table-cell>
          <table:table-cell table:style-name="Table5.A1" office:value-type="string">
            <text:p text:style-name="Table_20_Contents">Funnel performance</text:p>
          </table:table-cell>
        </table:table-row>
        <table:table-row>
          <table:table-cell table:style-name="Table5.A1" office:value-type="string">
            <text:p text:style-name="Table_20_Contents">Forecasted Revenue</text:p>
          </table:table-cell>
          <table:table-cell table:style-name="Table5.A1" office:value-type="string">
            <text:p text:style-name="Table_20_Contents">Revenue planning</text:p>
          </table:table-cell>
        </table:table-row>
        <table:table-row>
          <table:table-cell table:style-name="Table5.A1" office:value-type="string">
            <text:p text:style-name="Table_20_Contents">Deal Velocity</text:p>
          </table:table-cell>
          <table:table-cell table:style-name="Table5.A1" office:value-type="string">
            <text:p text:style-name="Table_20_Contents">Pipeline speed</text:p>
          </table:table-cell>
        </table:table-row>
      </table:table>
      <text:p text:style-name="P15"/>
      <text:h text:style-name="Heading_20_1" text:outline-level="1">11. Problems Solved</text:h>
      <table:table table:name="Table6" table:style-name="Table6">
        <table:table-column table:style-name="Table6.A"/>
        <table:table-column table:style-name="Table6.B"/>
        <table:table-header-rows>
          <table:table-row>
            <table:table-cell table:style-name="Table6.A1" office:value-type="string">
              <text:p text:style-name="Table_20_Heading">Problem</text:p>
            </table:table-cell>
            <table:table-cell table:style-name="Table6.A1" office:value-type="string">
              <text:p text:style-name="Table_20_Heading">Solution</text:p>
            </table:table-cell>
          </table:table-row>
        </table:table-header-rows>
        <table:table-row>
          <table:table-cell table:style-name="Table6.A1" office:value-type="string">
            <text:p text:style-name="Table_20_Contents">Duplicate contacts</text:p>
          </table:table-cell>
          <table:table-cell table:style-name="Table6.A1" office:value-type="string">
            <text:p text:style-name="Table_20_Contents">Deduplication workflow</text:p>
          </table:table-cell>
        </table:table-row>
        <table:table-row>
          <table:table-cell table:style-name="Table6.A1" office:value-type="string">
            <text:p text:style-name="Table_20_Contents">Missing lead ownership</text:p>
          </table:table-cell>
          <table:table-cell table:style-name="Table6.A1" office:value-type="string">
            <text:p text:style-name="Table_20_Contents">Automated assignment</text:p>
          </table:table-cell>
        </table:table-row>
        <table:table-row>
          <table:table-cell table:style-name="Table6.A1" office:value-type="string">
            <text:p text:style-name="Table_20_Contents">Inconsistent lifecycle stages</text:p>
          </table:table-cell>
          <table:table-cell table:style-name="Table6.A1" office:value-type="string">
            <text:p text:style-name="Table_20_Contents">Standardized definitions</text:p>
          </table:table-cell>
        </table:table-row>
        <table:table-row>
          <table:table-cell table:style-name="Table6.A1" office:value-type="string">
            <text:p text:style-name="Table_20_Contents">Poor reporting visibility</text:p>
          </table:table-cell>
          <table:table-cell table:style-name="Table6.A1" office:value-type="string">
            <text:p text:style-name="Table_20_Contents">Dashboard implementation</text:p>
          </table:table-cell>
        </table:table-row>
      </table:table>
      <text:p text:style-name="P15"/>
      <text:h text:style-name="Heading_20_1" text:outline-level="1">12. Skills Demonstrated</text:h>
      <text:list text:style-name="L6">
        <text:list-item>
          <text:p text:style-name="P42">CRM Administration </text:p>
        </text:list-item>
        <text:list-item>
          <text:p text:style-name="P42">Revenue Operations </text:p>
        </text:list-item>
        <text:list-item>
          <text:p text:style-name="P42">Pipeline Management </text:p>
        </text:list-item>
        <text:list-item>
          <text:p text:style-name="P42">Workflow Automation </text:p>
        </text:list-item>
        <text:list-item>
          <text:p text:style-name="P42">Data Cleanup &amp; Standardization </text:p>
        </text:list-item>
        <text:list-item>
          <text:p text:style-name="P42">Reporting &amp; Dashboarding </text:p>
        </text:list-item>
        <text:list-item>
          <text:p text:style-name="P42">Sales Operations </text:p>
        </text:list-item>
        <text:list-item>
          <text:p text:style-name="P43">Lifecycle Management </text:p>
        </text:list-item>
      </text:list>
      <text:p text:style-name="P15"/>
      <text:h text:style-name="Heading_20_1" text:outline-level="1">13. Final Project Summary</text:h>
      <text:p text:style-name="Text_20_body">Designed and implemented a complete B2B SaaS CRM system in HubSpot to support the full customer lifecycle and sales process. The project included contact, company, and deal management; lifecycle-stage configuration; sales pipeline tracking; lead-source analysis; workflow automation; sales activity management; and dashboard reporting for pipeline visibility, forecasting, acquisition, productivity, and performance.</text:p>
      <text:p text:style-name="Text_20_body">The CRM was also supported by data-governance standards covering duplicate management, required-field validation, capitalization, phone-number normalization, and consistent record formatting. <text:soft-page-break/>Together, these components created a scalable and organized revenue operations system that improves data quality, strengthens reporting accuracy, and supports more efficient sales and customer-management processes.</text:p>
      <text:p text:style-name="Text_20_body"/>
      <text:p text:style-name="Text_20_body">Example:</text:p>
      <text:p text:style-name="Text_20_body">Designed and implemented a complete B2B SaaS CRM system using HubSpot, including lifecycle management, sales pipeline tracking, workflow automation, dashboard reporting, and CRM data governance processes to support scalable revenue opera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0T19:25:02.659988500</meta:creation-date>
    <dc:date>2026-07-10T23:01:28.176463900</dc:date>
    <meta:editing-duration>PT16H26M44S</meta:editing-duration>
    <meta:editing-cycles>18</meta:editing-cycles>
    <meta:generator>LibreOffice/26.2.4.2$Windows_X86_64 LibreOffice_project/0229ac93fcf0d7cbc6376066c6f35021cef002dc</meta:generator>
    <meta:document-statistic meta:table-count="6" meta:image-count="18" meta:object-count="0" meta:page-count="16" meta:paragraph-count="189" meta:word-count="1146" meta:character-count="8093" meta:non-whitespace-character-count="7124"/>
  </office:meta>
</office:document-meta>
</file>